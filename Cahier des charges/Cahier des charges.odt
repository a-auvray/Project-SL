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ff3f1" officeooo:paragraph-rsid="000ff3f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430c" officeooo:paragraph-rsid="0015430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f3f1" officeooo:paragraph-rsid="000ff3f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ff3f1" officeooo:paragraph-rsid="000ff3f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20pt" officeooo:rsid="000ff3f1" officeooo:paragraph-rsid="000ff3f1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ff3f1" officeooo:paragraph-rsid="000ff3f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9896" officeooo:paragraph-rsid="0011989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20pt" officeooo:rsid="000ff3f1" officeooo:paragraph-rsid="00119896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256a4" officeooo:paragraph-rsid="001256a4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ff3f1" officeooo:paragraph-rsid="0011989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1ad8f" officeooo:paragraph-rsid="0011989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officeooo:rsid="0011ad8f" officeooo:paragraph-rsid="0013f39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1ad8f" officeooo:paragraph-rsid="0011ad8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256a4" officeooo:paragraph-rsid="0011ad8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2eb7" officeooo:paragraph-rsid="00142eb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2669" officeooo:paragraph-rsid="00142eb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2669" officeooo:paragraph-rsid="0017266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256a4" officeooo:paragraph-rsid="001256a4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rsid="000ff3f1" officeooo:paragraph-rsid="000ff3f1"/>
    </style:style>
    <style:style style:name="T1" style:family="text">
      <style:text-properties officeooo:rsid="00119896"/>
    </style:style>
    <style:style style:name="T2" style:family="text">
      <style:text-properties fo:font-weight="bold" officeooo:rsid="0011ad8f" style:font-weight-asian="bold" style:font-weight-complex="bold"/>
    </style:style>
    <style:style style:name="T3" style:family="text">
      <style:text-properties officeooo:rsid="0013f39c"/>
    </style:style>
    <style:style style:name="T4" style:family="text">
      <style:text-properties officeooo:rsid="001a04fe"/>
    </style:style>
    <style:style style:name="T5" style:family="text">
      <style:text-properties officeooo:rsid="001bbacd"/>
    </style:style>
    <style:style style:name="T6" style:family="text">
      <style:text-properties fo:font-weight="bold" officeooo:rsid="001256a4" style:font-weight-asian="bold" style:font-weight-complex="bold"/>
    </style:style>
    <style:style style:name="T7" style:family="text">
      <style:text-properties officeooo:rsid="0015430c"/>
    </style:style>
    <style:style style:name="T8" style:family="text">
      <style:text-properties officeooo:rsid="0016e9ed"/>
    </style:style>
    <style:style style:name="T9" style:family="text">
      <style:text-properties fo:font-weight="bold" officeooo:rsid="0017266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1"/>
      <text:p text:style-name="P2">pu = pull up</text:p>
      <text:p text:style-name="P2">mu = muscle up</text:p>
      <text:p text:style-name="P2">dips = dips</text:p>
      <text:p text:style-name="P2">1rm = charge maximale sur une rep </text:p>
      <text:p text:style-name="P3"/>
      <text:p text:style-name="P3"/>
      <text:p text:style-name="P3"/>
      <text:p text:style-name="P4"/>
      <text:p text:style-name="P5">Le But et la Cible :</text:p>
      <text:p text:style-name="P5"/>
      <text:p text:style-name="P6">Créer une application de suivi de street lifting.</text:p>
      <text:p text:style-name="P6"/>
      <text:p text:style-name="P7">Pour aider au suivi de ma progression, ainsi que celle de quelques amis</text:p>
      <text:p text:style-name="P7"/>
      <text:p text:style-name="P7"/>
      <text:p text:style-name="P7"/>
      <text:p text:style-name="P7"/>
      <text:p text:style-name="P7"/>
      <text:p text:style-name="P8">Le<text:span text:style-name="T1">s fonctionnalités </text:span>:</text:p>
      <text:p text:style-name="P8"/>
      <text:p text:style-name="P9">V1</text:p>
      <text:p text:style-name="P8"/>
      <text:p text:style-name="P10">-<text:span text:style-name="T2">Entrer les perfs</text:span></text:p>
      <text:p text:style-name="P11"/>
      <text:p text:style-name="P12">entrer :</text:p>
      <text:p text:style-name="P12">-date</text:p>
      <text:p text:style-name="P12">-le type de séance (ex : tractions/dips, tractions volume, dips force etc)</text:p>
      <text:p text:style-name="P12">-<text:span text:style-name="T3">écrire un </text:span>commentaire sur la séance</text:p>
      <text:p text:style-name="P12">-chosir l’exercice</text:p>
      <text:p text:style-name="P12">-entrer les séries, reps, charges, méthode d’intensification et un RPE</text:p>
      <text:p text:style-name="P12"/>
      <text:p text:style-name="P12">-<text:span text:style-name="T4">Il faudra choisir alors entre plusieurs catégories (streetlifting, repos, deload,) et la case concernée sera coloriée en une certaine couleur pour s’y retrouver plus facilement. </text:span><text:span text:style-name="T5">Si il s’agit d’un jour de PR, un petit emoji médaille ou trophée apparraitra sur la case </text:span></text:p>
      <text:p text:style-name="P12">-</text:p>
      <text:p text:style-name="P13"/>
      <text:p text:style-name="P13">-<text:span text:style-name="T6">Estimation RM/total</text:span></text:p>
      <text:p text:style-name="P14"/>
      <text:p text:style-name="P15">-rubrique avec le max réél (perf sur 1rm la plus élevée jamais réalisée) qui s’actualise toute seule en venant piocher dans toutes les séances réalisées </text:p>
      <text:p text:style-name="P15">a coté de </text:p>
      <text:p text:style-name="P15"><text:soft-page-break/>-rubrique pour faire une estimation via un calcul <text:span text:style-name="T7">(cette fois a entrer à la main) de la 1 rm </text:span><text:span text:style-name="T8">(mu,pu,dips) (le calcul doit prendre en compte reps, charge et RPE pour être le plus précis possible)</text:span></text:p>
      <text:p text:style-name="P15"/>
      <text:p text:style-name="P15"/>
      <text:p text:style-name="P15"/>
      <text:p text:style-name="P15"/>
      <text:p text:style-name="P15">-<text:span text:style-name="T9">Sauvegarde des données</text:span></text:p>
      <text:p text:style-name="P16"/>
      <text:p text:style-name="P17">-individuelle comme plusieurs personnes utilisent l’appli</text:p>
      <text:p text:style-name="P17"/>
      <text:p text:style-name="P17">-save dans un fichier txt ou CSV afin de sauvegarder les données quand on ferme l’application. </text:p>
      <text:p text:style-name="P15"/>
      <text:p text:style-name="P18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19:21:29.666356200</meta:creation-date>
    <dc:date>2026-06-20T14:56:13.142581200</dc:date>
    <meta:editing-duration>PT8H46M13S</meta:editing-duration>
    <meta:editing-cycles>2</meta:editing-cycles>
    <meta:generator>LibreOffice/25.8.7.3$Windows_X86_64 LibreOffice_project/30742500f2d3eb4366ac312fa33d3dcabdb3eba5</meta:generator>
    <meta:document-statistic meta:table-count="0" meta:image-count="0" meta:object-count="0" meta:page-count="2" meta:paragraph-count="26" meta:word-count="222" meta:character-count="1301" meta:non-whitespace-character-count="1100"/>
  </office:meta>
</office:document-meta>
</file>